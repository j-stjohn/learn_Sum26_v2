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asic Commands</text:p>
          </table:table-cell>
          <table:covered-table-cell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Display a line of text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utput the contents of a file into the standard output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Outputs the contents of a directory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pies files from one file onto another or into a dir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(move), simplest form is to rename files, but can move into dir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Create a file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emove a file or directory, rm -rf DIR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13:02:10.373390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10:18:31.655360930</meta:creation-date>
    <dc:date>2026-06-18T18:48:47.393691778</dc:date>
    <meta:editing-duration>PT4H12M48S</meta:editing-duration>
    <meta:editing-cycles>1</meta:editing-cycles>
    <meta:generator>LibreOffice/24.2.7.2$Linux_X86_64 LibreOffice_project/420$Build-2</meta:generator>
    <meta:document-statistic meta:table-count="1" meta:cell-count="17" meta:object-count="0"/>
  </office:meta>
</office:document-meta>
</file>